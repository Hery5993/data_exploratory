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line-height="100%"/>
      <style:text-properties style:font-name="Ubuntu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Ubuntu" fo:font-size="12pt" officeooo:paragraph-rsid="0029faa5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Ubuntu" fo:font-size="12pt" officeooo:rsid="0023bf6a" officeooo:paragraph-rsid="0029faa5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Ubuntu" fo:font-size="12pt" officeooo:rsid="0023bf6a" officeooo:paragraph-rsid="0023bf6a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Ubuntu" fo:font-size="12pt" officeooo:rsid="002595e2" officeooo:paragraph-rsid="002595e2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Ubuntu" fo:font-size="12pt" officeooo:rsid="00292c46" officeooo:paragraph-rsid="00292c46" style:font-size-asian="12pt" style:font-size-complex="12pt"/>
    </style:style>
    <style:style style:name="P8" style:family="paragraph" style:parent-style-name="Heading_20_1" style:list-style-name="L1">
      <style:paragraph-properties fo:margin-top="0.021cm" fo:margin-bottom="0cm" style:contextual-spacing="false" fo:line-height="100%" style:writing-mode="lr-tb" style:writing-mode-automatic="false"/>
      <style:text-properties style:font-name="Ubuntu" fo:font-size="12pt" fo:font-weight="normal" officeooo:paragraph-rsid="0029faa5" style:font-size-asian="12pt" style:font-weight-asian="normal" style:font-size-complex="12pt" style:font-weight-complex="normal"/>
    </style:style>
    <style:style style:name="P9" style:family="paragraph" style:parent-style-name="Heading_20_1" style:list-style-name="L1">
      <style:paragraph-properties fo:margin-top="0.021cm" fo:margin-bottom="0cm" style:contextual-spacing="false" fo:line-height="100%"/>
      <style:text-properties style:font-name="Ubuntu" fo:font-size="12pt" fo:font-weight="normal" officeooo:paragraph-rsid="002a1f59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margin-top="0.021cm" fo:margin-bottom="0cm" style:contextual-spacing="false" fo:line-height="100%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.021cm" fo:margin-bottom="0cm" style:contextual-spacing="false" fo:line-height="100%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.021cm" fo:margin-bottom="0cm" style:contextual-spacing="false" fo:line-height="100%"/>
      <style:text-properties style:font-name="Ubuntu" fo:font-size="12pt" fo:font-weight="normal" officeooo:paragraph-rsid="002a1f59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.021cm" fo:margin-bottom="0cm" style:contextual-spacing="false" fo:line-height="100%"/>
      <style:text-properties style:font-name="Ubuntu" fo:font-size="12pt" officeooo:paragraph-rsid="002a1f59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Ubuntu" fo:font-size="12pt" officeooo:rsid="0029faa5" officeooo:paragraph-rsid="0029faa5" style:font-size-asian="12pt" style:font-size-complex="12pt"/>
    </style:style>
    <style:style style:name="T1" style:family="text">
      <style:text-properties officeooo:rsid="0035bc02"/>
    </style:style>
    <style:style style:name="T2" style:family="text">
      <style:text-properties officeooo:rsid="001cf5fb"/>
    </style:style>
    <style:style style:name="T3" style:family="text">
      <style:text-properties officeooo:rsid="0023bf6a"/>
    </style:style>
    <style:style style:name="T4" style:family="text">
      <style:text-properties officeooo:rsid="0027ddc0"/>
    </style:style>
    <style:style style:name="T5" style:family="text">
      <style:text-properties officeooo:rsid="002a1f5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faa5" style:font-weight-asian="bold" style:font-weight-complex="bold"/>
    </style:style>
    <style:style style:name="T9" style:family="text">
      <style:text-properties officeooo:rsid="00326e68"/>
    </style:style>
    <text:list-style style:name="L1">
      <text:list-level-style-bullet text:level="1" text:style-name="Bullet_20_Symbols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EDA for <text:span text:style-name="T1">random 1D NdArray Numbers including 50 corrupted values</text:span></text:h>
      <text:h text:style-name="P1" text:outline-level="2">Dataset</text:h>
      <text:p text:style-name="P2">Create a 1D NumPy array of 1000 elements representing sensor readings using a normal distribution (mean=50, std=10). Then, randomly "corrupt" 50 of these points by setting them to np.nan.</text:p>
      <text:h text:style-name="P1" text:outline-level="2">Structure &amp; Integrity</text:h>
      <text:p text:style-name="P3"><text:span text:style-name="T2">Shape : </text:span><text:span text:style-name="T3">(1000,) 1D Numpy NdArray</text:span></text:p>
      <text:p text:style-name="P4">Dtype : Float64</text:p>
      <text:p text:style-name="P5">Missing Values : 50</text:p>
      <text:p text:style-name="P6">Correction of missing values : <text:span text:style-name="T4">U</text:span>sing 0,0</text:p>
      <text:h text:style-name="P1" text:outline-level="2">Central tandency &amp; Distribution</text:h>
      <text:p text:style-name="P7">Median Value : 49.39076363921143 (seed=93)</text:p>
      <text:p text:style-name="P7">Mean Value : 47.56764974790065 (seed=93)</text:p>
      <text:p text:style-name="P7">Variance : 202.41305403471853 (seed=93)</text:p>
      <text:p text:style-name="P7">Standard Deviation : 14.227194172946348 (seed=93)</text:p>
      <text:h text:style-name="P1" text:outline-level="2">Distribution Analysis</text:h>
      <text:list text:style-name="L1">
        <text:list-item>
          <text:h text:style-name="P8" text:outline-level="1">According to measurements: <text:span text:style-name="T5">Mean </text:span>&lt; <text:span text:style-name="T5">Median</text:span>, major datas are on the right</text:h>
        </text:list-item>
        <text:list-item>
          <text:h text:style-name="P8" text:outline-level="1">According to the histogram visualy it is left skewed, major datas are on the right</text:h>
        </text:list-item>
        <text:list-item>
          <text:h text:style-name="P9" text:outline-level="1">According the quantiles Q(0.5) = median, determine distance of Q(0.25) to Q(0.5) and Q(0.5) to Q(0.75)</text:h>
        </text:list-item>
      </text:list>
      <text:h text:style-name="P10" text:outline-level="1" text:is-list-header="true"/>
      <text:h text:style-name="P11" text:outline-level="2" text:is-list-header="true"><text:tab/>d1 = - 42.04295143 + 49.39076364 <text:s/>= 7.34781221</text:h>
      <text:h text:style-name="P11" text:outline-level="2" text:is-list-header="true"><text:tab/>d2 = 56.41592794 - 49.39076364 <text:s text:c="3"/>= 7.02516430</text:h>
      <text:h text:style-name="P12" text:outline-level="2" text:is-list-header="true"><text:tab/></text:h>
      <text:h text:style-name="P13" text:outline-level="2"><text:span text:style-name="T6"><text:tab/></text:span><text:span text:style-name="T7">d2 &lt; d1 </text:span><text:span text:style-name="T8">i.e.</text:span><text:span text:style-name="T7"> </text:span><text:span text:style-name="T8">data is </text:span><text:span text:style-name="T7">left skewed</text:span></text:h>
      <text:h text:style-name="P1" text:outline-level="2">Relationships</text:h>
      <text:p text:style-name="P14">No<text:span text:style-name="T9">t need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21:22:48.691117187</meta:creation-date>
    <dc:date>2026-05-12T21:54:55.870920460</dc:date>
    <meta:editing-duration>PT20M10S</meta:editing-duration>
    <meta:editing-cycles>15</meta:editing-cycles>
    <meta:generator>LibreOffice/26.2.3.2$Linux_X86_64 LibreOffice_project/70e089b17412e4cb7773e41413306b17a2328c34</meta:generator>
    <meta:document-statistic meta:table-count="0" meta:image-count="0" meta:object-count="0" meta:page-count="1" meta:paragraph-count="23" meta:word-count="160" meta:character-count="1014" meta:non-whitespace-character-count="871"/>
  </office:meta>
</office:document-meta>
</file>